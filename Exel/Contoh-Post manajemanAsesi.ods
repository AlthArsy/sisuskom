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11111"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Lembar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ole</text:p>
          </table:table-cell>
          <table:table-cell/>
          <table:table-cell table:style-name="ce5" table:number-columns-repeated="21"/>
          <table:table-cell table:style-name="ce5" office:value-type="string" calcext:value-type="string">
            <text:p>Narumi</text:p>
          </table:table-cell>
          <table:table-cell table:style-name="ce5" table:number-columns-repeated="16358"/>
        </table:table-row>
        <table:table-row table:style-name="ro2">
          <table:table-cell table:style-name="ce2" office:value-type="string" calcext:value-type="string">
            <text:p>Narumi</text:p>
          </table:table-cell>
          <table:table-cell table:formula="of:=CHAR(RANDBETWEEN(65;90))&amp;CHAR(RANDBETWEEN(97;122))&amp;RANDBETWEEN(1000;9999)&amp;CHAR(RANDBETWEEN(97;122))" office:value-type="string" office:string-value="Oa2805g" calcext:value-type="string">
            <text:p>Oa2805g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Sekar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Sekar</text:p>
          </table:table-cell>
          <table:table-cell table:formula="of:=CHAR(RANDBETWEEN(65;90))&amp;CHAR(RANDBETWEEN(97;122))&amp;RANDBETWEEN(1000;9999)&amp;CHAR(RANDBETWEEN(97;122))" office:value-type="string" office:string-value="Zl6633y" calcext:value-type="string">
            <text:p>Zl6633y</text:p>
          </table:table-cell>
          <table:table-cell office:value-type="string" calcext:value-type="string">
            <text:p>Asesi</text:p>
          </table:table-cell>
          <table:table-cell table:number-columns-repeated="3"/>
          <table:table-cell table:style-name="ce6"/>
          <table:table-cell table:number-columns-repeated="18"/>
          <table:table-cell office:value-type="string" calcext:value-type="string">
            <text:p>Ain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Aina</text:p>
          </table:table-cell>
          <table:table-cell table:formula="of:=CHAR(RANDBETWEEN(65;90))&amp;CHAR(RANDBETWEEN(97;122))&amp;RANDBETWEEN(1000;9999)&amp;CHAR(RANDBETWEEN(97;122))" office:value-type="string" office:string-value="Nr1430b" calcext:value-type="string">
            <text:p>Nr1430b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Bunga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Bungaa</text:p>
          </table:table-cell>
          <table:table-cell table:formula="of:=CHAR(RANDBETWEEN(65;90))&amp;CHAR(RANDBETWEEN(97;122))&amp;RANDBETWEEN(1000;9999)&amp;CHAR(RANDBETWEEN(97;122))" office:value-type="string" office:string-value="Fo9922w" calcext:value-type="string">
            <text:p>Fo9922w</text:p>
          </table:table-cell>
          <table:table-cell office:value-type="string" calcext:value-type="string">
            <text:p>Asesor</text:p>
          </table:table-cell>
          <table:table-cell table:number-columns-repeated="22"/>
          <table:table-cell office:value-type="string" calcext:value-type="string">
            <text:p>Bentely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Bentely</text:p>
          </table:table-cell>
          <table:table-cell table:formula="of:=CHAR(RANDBETWEEN(65;90))&amp;CHAR(RANDBETWEEN(97;122))&amp;RANDBETWEEN(1000;9999)&amp;CHAR(RANDBETWEEN(97;122))" office:value-type="string" office:string-value="Hz8787w" calcext:value-type="string">
            <text:p>Hz8787w</text:p>
          </table:table-cell>
          <table:table-cell office:value-type="string" calcext:value-type="string">
            <text:p>Asesor</text:p>
          </table:table-cell>
          <table:table-cell table:number-columns-repeated="22"/>
          <table:table-cell office:value-type="string" calcext:value-type="string">
            <text:p>Porse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Porse</text:p>
          </table:table-cell>
          <table:table-cell table:formula="of:=CHAR(RANDBETWEEN(65;90))&amp;CHAR(RANDBETWEEN(97;122))&amp;RANDBETWEEN(1000;9999)&amp;CHAR(RANDBETWEEN(97;122))" office:value-type="string" office:string-value="Wk8959k" calcext:value-type="string">
            <text:p>Wk8959k</text:p>
          </table:table-cell>
          <table:table-cell office:value-type="string" calcext:value-type="string">
            <text:p>Asesor</text:p>
          </table:table-cell>
          <table:table-cell table:number-columns-repeated="22"/>
          <table:table-cell office:value-type="string" calcext:value-type="string">
            <text:p>Deep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Deep</text:p>
          </table:table-cell>
          <table:table-cell table:formula="of:=CHAR(RANDBETWEEN(65;90))&amp;CHAR(RANDBETWEEN(97;122))&amp;RANDBETWEEN(1000;9999)&amp;CHAR(RANDBETWEEN(97;122))" office:value-type="string" office:string-value="Cf3536v" calcext:value-type="string">
            <text:p>Cf3536v</text:p>
          </table:table-cell>
          <table:table-cell office:value-type="string" calcext:value-type="string">
            <text:p>Asesor</text:p>
          </table:table-cell>
          <table:table-cell table:number-columns-repeated="22"/>
          <table:table-cell office:value-type="string" calcext:value-type="string">
            <text:p>Nami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Nami</text:p>
          </table:table-cell>
          <table:table-cell table:formula="of:=CHAR(RANDBETWEEN(65;90))&amp;CHAR(RANDBETWEEN(97;122))&amp;RANDBETWEEN(1000;9999)&amp;CHAR(RANDBETWEEN(97;122))" office:value-type="string" office:string-value="Xq9071z" calcext:value-type="string">
            <text:p>Xq9071z</text:p>
          </table:table-cell>
          <table:table-cell office:value-type="string" calcext:value-type="string">
            <text:p>Asesor</text:p>
          </table:table-cell>
          <table:table-cell table:number-columns-repeated="22"/>
          <table:table-cell office:value-type="string" calcext:value-type="string">
            <text:p>Silvi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Silvia</text:p>
          </table:table-cell>
          <table:table-cell table:formula="of:=CHAR(RANDBETWEEN(65;90))&amp;CHAR(RANDBETWEEN(97;122))&amp;RANDBETWEEN(1000;9999)&amp;CHAR(RANDBETWEEN(97;122))" office:value-type="string" office:string-value="Fg3328y" calcext:value-type="string">
            <text:p>Fg3328y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Titisan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Titisan</text:p>
          </table:table-cell>
          <table:table-cell table:formula="of:=CHAR(RANDBETWEEN(65;90))&amp;CHAR(RANDBETWEEN(97;122))&amp;RANDBETWEEN(1000;9999)&amp;CHAR(RANDBETWEEN(97;122))" office:value-type="string" office:string-value="Id2683f" calcext:value-type="string">
            <text:p>Id2683f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Sif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Sifa</text:p>
          </table:table-cell>
          <table:table-cell table:formula="of:=CHAR(RANDBETWEEN(65;90))&amp;CHAR(RANDBETWEEN(97;122))&amp;RANDBETWEEN(1000;9999)&amp;CHAR(RANDBETWEEN(97;122))" office:value-type="string" office:string-value="Ux5859a" calcext:value-type="string">
            <text:p>Ux5859a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Aly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Alya</text:p>
          </table:table-cell>
          <table:table-cell table:formula="of:=CHAR(RANDBETWEEN(65;90))&amp;CHAR(RANDBETWEEN(97;122))&amp;RANDBETWEEN(1000;9999)&amp;CHAR(RANDBETWEEN(97;122))" office:value-type="string" office:string-value="Md4321m" calcext:value-type="string">
            <text:p>Md4321m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Wenesday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Wenesday</text:p>
          </table:table-cell>
          <table:table-cell table:formula="of:=CHAR(RANDBETWEEN(65;90))&amp;CHAR(RANDBETWEEN(97;122))&amp;RANDBETWEEN(1000;9999)&amp;CHAR(RANDBETWEEN(97;122))" office:value-type="string" office:string-value="Tl3962m" calcext:value-type="string">
            <text:p>Tl3962m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Dil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Dila</text:p>
          </table:table-cell>
          <table:table-cell table:formula="of:=CHAR(RANDBETWEEN(65;90))&amp;CHAR(RANDBETWEEN(97;122))&amp;RANDBETWEEN(1000;9999)&amp;CHAR(RANDBETWEEN(97;122))" office:value-type="string" office:string-value="Rt8286m" calcext:value-type="string">
            <text:p>Rt8286m</text:p>
          </table:table-cell>
          <table:table-cell office:value-type="string" calcext:value-type="string">
            <text:p>Asesi</text:p>
          </table:table-cell>
          <table:table-cell table:number-columns-repeated="22"/>
          <table:table-cell office:value-type="string" calcext:value-type="string">
            <text:p>Nawila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Nawila</text:p>
          </table:table-cell>
          <table:table-cell table:formula="of:=CHAR(RANDBETWEEN(65;90))&amp;CHAR(RANDBETWEEN(97;122))&amp;RANDBETWEEN(1000;9999)&amp;CHAR(RANDBETWEEN(97;122))" office:value-type="string" office:string-value="Gk4804x" calcext:value-type="string">
            <text:p>Gk4804x</text:p>
          </table:table-cell>
          <table:table-cell office:value-type="string" calcext:value-type="string">
            <text:p>Asesi</text:p>
          </table:table-cell>
          <table:table-cell table:number-columns-repeated="16381"/>
        </table:table-row>
        <table:table-row table:style-name="ro2" table:number-rows-repeated="1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Lembar1.A2:Lembar1.A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20:43:47.911905101</meta:creation-date>
    <dc:date>2026-06-10T21:27:23.548279162</dc:date>
    <meta:editing-duration>PT20M32S</meta:editing-duration>
    <meta:editing-cycles>4</meta:editing-cycles>
    <meta:generator>LibreOffice/24.2.7.2$Linux_X86_64 LibreOffice_project/420$Build-2</meta:generator>
    <meta:document-statistic meta:table-count="1" meta:cell-count="63" meta:object-count="0"/>
  </office:meta>
</office:document-meta>
</file>